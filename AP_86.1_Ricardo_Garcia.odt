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69B2F50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 fo:text-align="center" style:justify-single-word="false"/>
      <style:text-properties style:font-name="Lato Black" fo:language="es" fo:country="ES" fo:font-weight="bold" officeooo:rsid="001e7d55" officeooo:paragraph-rsid="001e7d55" style:font-weight-asian="bold" style:font-weight-complex="bold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Lato Black" fo:language="es" fo:country="ES" fo:font-weight="bold" officeooo:rsid="001e7d55" officeooo:paragraph-rsid="001e7d55" style:font-weight-asian="bold" style:font-weight-complex="bold"/>
    </style:style>
    <style:style style:name="P3" style:family="paragraph" style:parent-style-name="Text_20_body" style:list-style-name="L1">
      <style:paragraph-properties fo:margin-top="0in" fo:margin-bottom="0in" style:contextual-spacing="false" fo:text-align="center" style:justify-single-word="false"/>
      <style:text-properties style:font-name="Lato Black" fo:language="es" fo:country="ES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Lato Black" fo:language="es" fo:country="ES" fo:font-weight="bold" style:font-weight-asian="bold" style:font-weight-complex="bold"/>
    </style:style>
    <style:style style:name="P5" style:family="paragraph" style:parent-style-name="Heading_20_1" style:list-style-name="L1">
      <style:paragraph-properties fo:text-align="center" style:justify-single-word="false"/>
      <style:text-properties style:font-name="Lato Black" fo:font-size="12pt" fo:language="es" fo:country="ES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Lato Black" fo:font-size="12pt" fo:language="es" fo:country="ES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left" style:justify-single-word="false"/>
      <style:text-properties style:font-name="Lato Black" fo:font-size="12pt" fo:language="es" fo:country="ES" fo:font-weight="bold" officeooo:rsid="001f76f1" officeooo:paragraph-rsid="001f76f1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left" style:justify-single-word="false"/>
      <style:text-properties style:font-name="Lato Black" fo:font-size="12pt" fo:language="es" fo:country="ES" fo:font-style="normal" fo:font-weight="normal" officeooo:rsid="001f76f1" officeooo:paragraph-rsid="001f76f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text-align="left" style:justify-single-word="false"/>
      <style:text-properties style:font-name="Lato Black" fo:font-size="12pt" fo:language="es" fo:country="ES" fo:font-style="normal" fo:font-weight="normal" officeooo:rsid="00228905" officeooo:paragraph-rsid="0022890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2">
      <style:paragraph-properties fo:text-align="left" style:justify-single-word="false"/>
      <style:text-properties style:font-name="Lato Black" fo:font-size="12pt" fo:language="es" fo:country="ES" fo:font-style="normal" fo:font-weight="normal" officeooo:rsid="00228905" officeooo:paragraph-rsid="0022890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2">
      <style:paragraph-properties fo:text-align="left" style:justify-single-word="false"/>
      <style:text-properties officeooo:paragraph-rsid="00228905"/>
    </style:style>
    <style:style style:name="P12" style:family="paragraph" style:parent-style-name="Text_20_body">
      <style:paragraph-properties fo:text-align="left" style:justify-single-word="false"/>
      <style:text-properties style:font-name="Lato Black" fo:font-size="12pt" fo:language="es" fo:country="ES" fo:font-style="normal" fo:font-weight="normal" officeooo:rsid="0021013e" officeooo:paragraph-rsid="0021013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3">
      <style:paragraph-properties fo:text-align="left" style:justify-single-word="false"/>
      <style:text-properties style:font-name="Lato Black" fo:font-size="12pt" fo:language="es" fo:country="ES" fo:font-style="normal" style:text-underline-style="solid" style:text-underline-width="auto" style:text-underline-color="font-color" fo:font-weight="normal" officeooo:rsid="0021013e" officeooo:paragraph-rsid="0021013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left" style:justify-single-word="false"/>
      <style:text-properties style:font-name="Lato Black" fo:font-size="12pt" fo:language="es" fo:country="ES" fo:font-style="normal" style:text-underline-style="none" fo:font-weight="normal" officeooo:rsid="0021013e" officeooo:paragraph-rsid="0021013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style:font-name="Lato Black" officeooo:rsid="0021013e" officeooo:paragraph-rsid="0021013e"/>
    </style:style>
    <style:style style:name="P16" style:family="paragraph" style:parent-style-name="Text_20_body">
      <style:text-properties officeooo:paragraph-rsid="002624ce"/>
    </style:style>
    <style:style style:name="P17" style:family="paragraph" style:parent-style-name="Text_20_body">
      <style:text-properties style:font-name="Lato Black" officeooo:rsid="0021013e"/>
    </style:style>
    <style:style style:name="P18" style:family="paragraph" style:parent-style-name="Text_20_body">
      <style:text-properties style:font-name="Lato Black" officeooo:rsid="002624ce" officeooo:paragraph-rsid="002624ce"/>
    </style:style>
    <style:style style:name="P19" style:family="paragraph" style:parent-style-name="Heading_20_2">
      <style:text-properties style:font-name="Lato Black" officeooo:rsid="002624ce" officeooo:paragraph-rsid="002624ce"/>
    </style:style>
    <style:style style:name="P20" style:family="paragraph" style:parent-style-name="Text_20_body">
      <style:text-properties style:font-name="Lato Black" officeooo:rsid="002624ce"/>
    </style:style>
    <style:style style:name="P21" style:family="paragraph" style:parent-style-name="Text_20_body" style:list-style-name="L4">
      <style:paragraph-properties fo:margin-top="0in" fo:margin-bottom="0in" style:contextual-spacing="false"/>
      <style:text-properties style:font-name="Lato Black" officeooo:rsid="002624ce"/>
    </style:style>
    <style:style style:name="P22" style:family="paragraph" style:parent-style-name="Text_20_body" style:list-style-name="L4">
      <style:text-properties style:font-name="Lato Black" officeooo:rsid="002624ce"/>
    </style:style>
    <style:style style:name="P23" style:family="paragraph" style:parent-style-name="Text_20_body">
      <style:text-properties style:font-name="Lato Black" officeooo:rsid="00263d23" officeooo:paragraph-rsid="00263d23"/>
    </style:style>
    <style:style style:name="P24" style:family="paragraph" style:parent-style-name="Text_20_body">
      <style:text-properties fo:color="#000000" loext:opacity="100%" style:font-name="Lato Black" officeooo:rsid="00263d23" officeooo:paragraph-rsid="00263d23"/>
    </style:style>
    <style:style style:name="P25" style:family="paragraph" style:parent-style-name="Text_20_body">
      <style:text-properties fo:color="#ff4000" loext:opacity="100%" style:font-name="Lato Black" officeooo:rsid="00263d23" officeooo:paragraph-rsid="00263d23"/>
    </style:style>
    <style:style style:name="P26" style:family="paragraph" style:parent-style-name="Text_20_body">
      <style:text-properties fo:color="#000000" loext:opacity="100%" style:font-name="Lato Black" officeooo:rsid="00268a16" officeooo:paragraph-rsid="00268a16"/>
    </style:style>
    <style:style style:name="P27" style:family="paragraph" style:parent-style-name="Text_20_body">
      <style:text-properties fo:color="#ff4000" loext:opacity="100%" style:font-name="Lato Black" officeooo:rsid="00268a16" officeooo:paragraph-rsid="00268a16"/>
    </style:style>
    <style:style style:name="P28" style:family="paragraph" style:parent-style-name="Text_20_body">
      <style:text-properties fo:color="#000000" loext:opacity="100%" style:font-name="Lato Black" officeooo:rsid="00282e7e" officeooo:paragraph-rsid="00282e7e"/>
    </style:style>
    <style:style style:name="P29" style:family="paragraph" style:parent-style-name="Text_20_body">
      <style:text-properties fo:color="#ff4000" loext:opacity="100%" style:font-name="Lato Black" officeooo:rsid="00282e7e" officeooo:paragraph-rsid="00282e7e"/>
    </style:style>
    <style:style style:name="P30" style:family="paragraph" style:parent-style-name="Heading_20_2">
      <style:text-properties fo:color="#000000" loext:opacity="100%" style:font-name="Lato Black" officeooo:rsid="00282e7e" officeooo:paragraph-rsid="00282e7e"/>
    </style:style>
    <style:style style:name="P31" style:family="paragraph" style:parent-style-name="Text_20_body">
      <style:text-properties fo:color="#000000" loext:opacity="100%" style:font-name="Lato Black" officeooo:rsid="00282e7e"/>
    </style:style>
    <style:style style:name="P32" style:family="paragraph" style:parent-style-name="Heading_20_3">
      <style:paragraph-properties fo:margin-left="0in" fo:margin-right="0in" fo:margin-top="0in" fo:margin-bottom="0.0972in" style:contextual-spacing="false" fo:line-height="115%" fo:text-indent="0in" style:auto-text-indent="false"/>
      <style:text-properties fo:color="#ff4000" loext:opacity="100%" style:font-name="Lato Black" officeooo:rsid="00282e7e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fo:color="#000000" loext:opacity="100%" style:font-name="Lato Black" officeooo:rsid="00282e7e"/>
    </style:style>
    <style:style style:name="P34" style:family="paragraph" style:parent-style-name="Text_20_body">
      <style:paragraph-properties fo:margin-top="0in" fo:margin-bottom="0in" style:contextual-spacing="false"/>
      <style:text-properties fo:color="#ff4000" loext:opacity="100%" style:font-name="Lato Black" officeooo:rsid="00282e7e" officeooo:paragraph-rsid="00282e7e"/>
    </style:style>
    <style:style style:name="P35" style:family="paragraph" style:parent-style-name="Text_20_body">
      <style:paragraph-properties fo:margin-top="0in" fo:margin-bottom="0in" style:contextual-spacing="false"/>
      <style:text-properties fo:color="#000000" loext:opacity="100%" style:font-name="Lato Black" officeooo:rsid="00282e7e" officeooo:paragraph-rsid="00282e7e"/>
    </style:style>
    <style:style style:name="P36" style:family="paragraph" style:parent-style-name="Text_20_body" style:list-style-name="L5">
      <style:text-properties fo:color="#000000" loext:opacity="100%" style:font-name="Lato Black" officeooo:rsid="00282e7e"/>
    </style:style>
    <style:style style:name="P37" style:family="paragraph" style:parent-style-name="Text_20_body">
      <style:text-properties fo:color="#000000" loext:opacity="100%" style:font-name="Lato Black" officeooo:rsid="0029fb4e" officeooo:paragraph-rsid="0029fb4e"/>
    </style:style>
    <style:style style:name="P38" style:family="paragraph" style:parent-style-name="Text_20_body" style:list-style-name="L6">
      <style:paragraph-properties fo:margin-top="0in" fo:margin-bottom="0in" style:contextual-spacing="false"/>
      <style:text-properties fo:color="#000000" loext:opacity="100%" style:font-name="Lato Black" officeooo:rsid="00282e7e"/>
    </style:style>
    <style:style style:name="P39" style:family="paragraph" style:parent-style-name="Text_20_body">
      <style:paragraph-properties fo:margin-top="0in" fo:margin-bottom="0in" style:contextual-spacing="false"/>
      <style:text-properties fo:color="#ff4000" loext:opacity="100%" style:font-name="Lato Black" officeooo:rsid="0029fb4e" officeooo:paragraph-rsid="0029fb4e"/>
    </style:style>
    <style:style style:name="P40" style:family="paragraph" style:parent-style-name="Text_20_body" style:list-style-name="L6">
      <style:text-properties fo:color="#000000" loext:opacity="100%" style:font-name="Lato Black" officeooo:rsid="00282e7e"/>
    </style:style>
    <style:style style:name="P41" style:family="paragraph" style:parent-style-name="Text_20_body">
      <style:text-properties fo:color="#ff4000" loext:opacity="100%" style:font-name="Lato Black" officeooo:rsid="0029fb4e" officeooo:paragraph-rsid="0029fb4e"/>
    </style:style>
    <style:style style:name="P42" style:family="paragraph" style:parent-style-name="Text_20_body" style:list-style-name="L7">
      <style:paragraph-properties fo:margin-top="0in" fo:margin-bottom="0in" style:contextual-spacing="false"/>
      <style:text-properties fo:color="#000000" loext:opacity="100%" style:font-name="Lato Black" officeooo:rsid="00282e7e" officeooo:paragraph-rsid="0029fb4e"/>
    </style:style>
    <style:style style:name="P43" style:family="paragraph" style:parent-style-name="Text_20_body" style:list-style-name="L7">
      <style:paragraph-properties fo:margin-top="0in" fo:margin-bottom="0in" style:contextual-spacing="false"/>
      <style:text-properties fo:color="#ff4000" loext:opacity="100%" style:font-name="Lato Black" officeooo:rsid="0029fb4e" officeooo:paragraph-rsid="0029fb4e"/>
    </style:style>
    <style:style style:name="P44" style:family="paragraph" style:parent-style-name="Text_20_body" style:list-style-name="L7">
      <style:paragraph-properties fo:margin-top="0in" fo:margin-bottom="0in" style:contextual-spacing="false"/>
      <style:text-properties officeooo:paragraph-rsid="0029fb4e"/>
    </style:style>
    <style:style style:name="P45" style:family="paragraph" style:parent-style-name="Text_20_body">
      <style:paragraph-properties fo:margin-top="0in" fo:margin-bottom="0in" style:contextual-spacing="false"/>
      <style:text-properties fo:color="#000000" loext:opacity="100%" style:font-name="Lato Black" officeooo:rsid="0029fb4e" officeooo:paragraph-rsid="0029fb4e"/>
    </style:style>
    <style:style style:name="P46" style:family="paragraph" style:parent-style-name="Text_20_body" style:list-style-name="L7">
      <style:text-properties fo:color="#000000" loext:opacity="100%" style:font-name="Lato Black" officeooo:rsid="00282e7e"/>
    </style:style>
    <style:style style:name="P47" style:family="paragraph" style:parent-style-name="Text_20_body">
      <style:text-properties fo:color="#ff4000" loext:opacity="100%" style:font-name="Lato Black" officeooo:rsid="002b84f6" officeooo:paragraph-rsid="002b84f6"/>
    </style:style>
    <style:style style:name="P48" style:family="paragraph" style:parent-style-name="Heading_20_2">
      <style:text-properties fo:color="#ff4000" loext:opacity="100%" style:font-name="Lato Black" officeooo:rsid="00282e7e"/>
    </style:style>
    <style:style style:name="P49" style:family="paragraph" style:parent-style-name="Text_20_body">
      <style:text-properties fo:color="#000000" loext:opacity="100%" style:font-name="Lato Black" officeooo:rsid="002b84f6" officeooo:paragraph-rsid="002b84f6"/>
    </style:style>
    <style:style style:name="P50" style:family="paragraph" style:parent-style-name="Text_20_body">
      <style:paragraph-properties fo:text-align="left" style:justify-single-word="false"/>
      <style:text-properties style:font-name="Lato Black" fo:font-size="12pt" fo:language="es" fo:country="ES" fo:font-style="normal" style:text-underline-style="solid" style:text-underline-width="auto" style:text-underline-color="font-color" fo:font-weight="normal" officeooo:rsid="0021013e" officeooo:paragraph-rsid="0021013e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1">
      <style:paragraph-properties fo:text-align="center" style:justify-single-word="false"/>
      <style:text-properties fo:language="es" fo:country="ES"/>
    </style:style>
    <style:style style:name="T1" style:family="text">
      <style:text-properties fo:language="es" fo:country="ES" fo:font-weight="bold" style:font-weight-asian="bold" style:font-weight-complex="bold"/>
    </style:style>
    <style:style style:name="T2" style:family="text">
      <style:text-properties officeooo:rsid="0021013e"/>
    </style:style>
    <style:style style:name="T3" style:family="text">
      <style:text-properties officeooo:rsid="002422dc"/>
    </style:style>
    <style:style style:name="T4" style:family="text">
      <style:text-properties style:font-name="Lato Black" fo:font-size="12pt" fo:language="es" fo:country="ES" fo:font-style="normal" fo:font-weight="normal" officeooo:rsid="00228905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ato Black" fo:font-size="12pt" fo:language="es" fo:country="ES" fo:font-style="normal" fo:font-weight="normal" officeooo:rsid="002422d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ato Black"/>
    </style:style>
    <style:style style:name="T7" style:family="text">
      <style:text-properties officeooo:rsid="002624ce"/>
    </style:style>
    <style:style style:name="T8" style:family="text">
      <style:text-properties style:font-name="Lato Black" officeooo:rsid="002624ce"/>
    </style:style>
    <style:style style:name="T9" style:family="text">
      <style:text-properties fo:color="#000000" loext:opacity="100%" style:text-underline-style="solid" style:text-underline-width="auto" style:text-underline-color="font-color"/>
    </style:style>
    <style:style style:name="T10" style:family="text">
      <style:text-properties fo:color="#000000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color="#ff4000" loext:opacity="100%"/>
    </style:style>
    <style:style style:name="T13" style:family="text">
      <style:text-properties officeooo:rsid="00282e7e"/>
    </style:style>
    <style:style style:name="T14" style:family="text">
      <style:text-properties fo:color="#000000" loext:opacity="100%"/>
    </style:style>
    <style:style style:name="T15" style:family="text">
      <style:text-properties officeooo:rsid="0029fb4e"/>
    </style:style>
    <style:style style:name="T16" style:family="text">
      <style:text-properties fo:color="#ff4000" loext:opacity="100%" style:font-name="Lato Black" officeooo:rsid="0029fb4e"/>
    </style:style>
    <style:style style:name="T17" style:family="text">
      <style:text-properties officeooo:rsid="002b84f6"/>
    </style:style>
    <style:style style:name="T18" style:family="text">
      <style:text-properties officeooo:rsid="002c7ce1"/>
    </style:style>
    <style:style style:name="T19" style:family="text">
      <style:text-properties fo:color="#ff4000" loext:opacity="100%" style:font-name="Lato Black" officeooo:rsid="002b84f6"/>
    </style:style>
    <style:style style:name="T20" style:family="text">
      <style:text-properties style:font-name="Lato Black" fo:language="es" fo:country="ES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portada"/><text:span text:style-name="Strong_20_Emphasis"><text:span text:style-name="T1"/></text:span></text:h>
      <text:list text:style-name="L1">
        <text:list-header>
          <text:p text:style-name="P1"/>
        </text:list-header>
      </text:list>
      <text:p text:style-name="P2"/>
      <text:list text:continue-numbering="true" text:style-name="L1">
        <text:list-header>
          <text:p text:style-name="P1"/>
          <text:p text:style-name="P1"/>
          <text:p text:style-name="P1"/>
          <text:p text:style-name="P1"/>
          <text:p text:style-name="P1">Ricardo García López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1">
        <text:list-header>
          <text:p text:style-name="P1">28/05/26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1">
        <text:list-header>
          <text:p text:style-name="P3">Módulo: MF0486_3 </text:p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2945725367734" text:continue-numbering="true" text:style-name="L1">
        <text:list-header>
          <text:h text:style-name="P5" text:outline-level="1">Fundamentos de ciberseguridad</text:h>
        </text:list-header>
      </text:list>
      <text:p text:style-name="P6"/>
      <text:p text:style-name="P6"/>
      <text:p text:style-name="P6"/>
      <text:p text:style-name="P6"/>
      <text:p text:style-name="P7"><text:soft-page-break/>Ejercicio 1 Gestión de Permisos</text:p>
      <text:p text:style-name="P7"/>
      <text:p text:style-name="P7">Teoría:</text:p>
      <text:p text:style-name="P7"/>
      <text:p text:style-name="P8">La gestión de los permisos <text:span text:style-name="T2">en Linux es muy importante, ya que te permite regular quien puede Leer (Read), Escribir (Write) y Ejecutar (Execute) un archivo o programa.</text:span></text:p>
      <text:p text:style-name="P9">Para gestionar los permisos de un archivo/programa se utilizan los siguientes comandos:</text:p>
      <text:list text:style-name="L2">
        <text:list-item>
          <text:p text:style-name="P10">chmod<text:span text:style-name="T3">(change mode)</text:span>: cambia los permisos</text:p>
        </text:list-item>
        <text:list-item>
          <text:p text:style-name="P10">chown<text:span text:style-name="T3">(change owner)</text:span>: Cambia el propietario de un archivo</text:p>
        </text:list-item>
        <text:list-item>
          <text:p text:style-name="P10">chgrp<text:span text:style-name="T3">(change group)</text:span>: Cambia el grupo de un archivo</text:p>
        </text:list-item>
        <text:list-item>
          <text:p text:style-name="P10">umask<text:span text:style-name="T3">(user mask)</text:span>: Muestra o cambia permisos por defecto de un archivo</text:p>
        </text:list-item>
        <text:list-item>
          <text:p text:style-name="P10">stat<text:span text:style-name="T3">(status)</text:span>: Muestra información detallada de permisos de un archivo</text:p>
        </text:list-item>
        <text:list-item>
          <text:p text:style-name="P11"><text:span text:style-name="T4">getfacl</text:span><text:span text:style-name="T5">(get file acces control list)</text:span><text:span text:style-name="T4">: </text:span><text:span text:style-name="T6">Sirve para dar permisos específicos a usuarios concretos sin cambiar los permisos normales de Linux.</text:span></text:p>
        </text:list-item>
      </text:list>
      <text:p text:style-name="P12">El comando que se utiliza para verificar cuales son los permisos de un archivo o programa dentro de un repositorio es:</text:p>
      <text:list text:style-name="L3">
        <text:list-item>
          <text:p text:style-name="P13">ls -l<text:span text:style-name="T7">a</text:span></text:p>
        </text:list-item>
      </text:list>
      <text:p text:style-name="P14">Al mandar este comando te lanza un:</text:p>
      <text:p text:style-name="Text_20_body">-rw-rw-r-- 1 kali kali 25552 May 28 10:53 AP_86.1_Ricardo_Garcia.odt</text:p>
      <text:p text:style-name="P15">¿Que significa -rw-rw-r--?</text:p>
      <text:p text:style-name="P15">Estos símbolos se dividen en 3 partes rwx, rwx, rwx, el primero es el apartado “Usuario(u)”, el segundo apartado es “Grupos(g)” y el tercero es “Otros(o)”</text:p>
      <text:p text:style-name="P15"/>
      <text:p text:style-name="P15">-Analiza la siguiente línea de permisos en Linux para un dispositivo de disco en <text:span text:style-name="Strong_20_Emphasis"><text:span text:style-name="Source_20_Text">/dev/sdb1</text:span></text:span></text:p>
      <text:p text:style-name="P15">brw-rw---- 1 root disk 8, 1 1 may 2024 /dev/sdb1</text:p>
      <text:p text:style-name="P15">¿Qué significa la <text:span text:style-name="Source_20_Text">"b"</text:span> al inicio de los permisos?</text:p>
      <text:p text:style-name="P16"><text:span text:style-name="T8">R:La letra “b” al inicio de la cadena de permisos indica que el archivo es un archivo de bloque (block special file).</text:span></text:p>
      <text:p text:style-name="P17"/>
      <text:p text:style-name="P17"/>
      <text:p text:style-name="P17"><text:soft-page-break/>¿Cómo permitirías que un usuario llamado <text:s/><text:span text:style-name="T7">backup </text:span>pueda leer y escribir en este dispositivo sin modificar el grupo?</text:p>
      <text:p text:style-name="P18">R: escribiría el comando<text:span text:style-name="T9"> </text:span><text:span text:style-name="T10">u+rw</text:span><text:span text:style-name="T11"> </text:span>seguido de el nombre del archivo que se quiere modificar</text:p>
      <text:p text:style-name="P17"/>
      <text:p text:style-name="P17">¿Cómo cambiarías los permisos a 660 en formato simbólico?</text:p>
      <text:p text:style-name="P18">R: el formato simbólico de 660 seria: rw-,rw-,---</text:p>
      <text:p text:style-name="P17"><text:span text:style-name="Strong_20_Emphasis"/></text:p>
      <text:p text:style-name="P17"><text:span text:style-name="Strong_20_Emphasis">Escribe los comandos necesarios para cambiar los permisos correctamente y justifica cada uno.</text:span></text:p>
      <text:p text:style-name="P18"/>
      <text:h text:style-name="P19" text:outline-level="2"><text:bookmark text:name="02---transferencia-de-archivo"/>02 - Transferencia de archivo</text:h>
      <text:p text:style-name="P20">Tienes un archivo “Bluffer.exe” de 24.576 Mega bits que necesitas transferir a un disco duro externo con una velocidad de transferencia de 480 Mbps.</text:p>
      <text:p text:style-name="P20">El disco duro tiene una latencia promedio de 8 ms por cada bloque de 4 MB transferidos.</text:p>
      <text:list text:style-name="L4">
        <text:list-item>
          <text:p text:style-name="P21">Convierte los Mega bits a Giga bytes. </text:p>
        </text:list-item>
        <text:list-item>
          <text:p text:style-name="P21">Calcula cuánto tiempo tardará en transferirse sin considerar la latencia. </text:p>
        </text:list-item>
        <text:list-item>
          <text:p text:style-name="P21">Determina cuánto tiempo adicional se agregará debido a la latencia. </text:p>
        </text:list-item>
        <text:list-item>
          <text:p text:style-name="P22">Calcula el tiempo total de transferencia, incluyendo la latencia. </text:p>
        </text:list-item>
      </text:list>
      <text:p text:style-name="P20"/>
      <text:p text:style-name="P23">Sabiendo que 1 byte son 8 bits se hace la división de 24.576 / 8 : <text:span text:style-name="T12"><text:s/>3072 MB</text:span></text:p>
      <text:p text:style-name="P24">Para saber cuantos GB son se hace la división 3072 / 1024 por que 1 GB son 1024, entonces:</text:p>
      <text:p text:style-name="P24">3072 / 1024 : <text:span text:style-name="T12">3 GB</text:span></text:p>
      <text:p text:style-name="P25"/>
      <text:p text:style-name="P26">Para calcular la velocidad de transferencia se utiliza la formula Tiempo= Cantidad de datos / Velocidad, entonces:</text:p>
      <text:p text:style-name="P27">24.576 / 480 : 51.2 segundos</text:p>
      <text:p text:style-name="P26">La manera para introducir la latencia de 8 ms por cada bloque de 4 MB seria con esta formula:</text:p>
      <text:p text:style-name="P26"><draw:frame draw:style-name="fr1" draw:name="Imagen1" text:anchor-type="char" svg:width="3.0937in" svg:height="0.7291in" draw:z-index="0"><draw:image xlink:href="Pictures/1000000000000129000000469B2F503B.png" xlink:type="simple" xlink:show="embed" xlink:actuate="onLoad" draw:mime-type="image/png"/></draw:frame></text:p>
      <text:p text:style-name="P27"/>
      <text:p text:style-name="P26"><text:soft-page-break/>Entonces:</text:p>
      <text:p text:style-name="P26">24.576Mb / 480 Mbps + <text:span text:style-name="T13">(3072 / 4) x 8 ms entonces:</text:span></text:p>
      <text:p text:style-name="P28">51.2seg + 768 bloques x 8:</text:p>
      <text:p text:style-name="P28">51.2 seg + <text:span text:style-name="T12">6.144 s (Esto seria el extra en segundos de latencia total)</text:span></text:p>
      <text:p text:style-name="P29">R: 57.3 segundos (Esto seria el tiempo total en segundos de transferencia con la latencia agregada)</text:p>
      <text:p text:style-name="P29"/>
      <text:h text:style-name="P30" text:outline-level="2"><text:bookmark text:name="03---identificación-de-equipos-informáticos"/>03 - Identificación de equipos informáticos</text:h>
      <text:p text:style-name="P31">Haz una lista de los equipos informáticos que podrían intervenir para garantizar el suministro de los siguientes servicios en un domicilio privado:</text:p>
      <text:h text:style-name="P32" text:outline-level="3"><text:bookmark text:name="suministro-eléctrico"/><text:span text:style-name="Strong_20_Emphasis"><text:span text:style-name="T14">Suministro eléctrico:</text:span></text:span></text:h>
      <text:list text:style-name="L5">
        <text:list-item>
          <text:p text:style-name="P33">¿Qué dispositivos permiten mantener el suministro en caso de corte de energía? </text:p>
        </text:list-item>
      </text:list>
      <text:p text:style-name="P34"><text:span text:style-name="T15">R: </text:span>Estos dispositivos se llama UPS <text:s/>(Uninterrumptible Power Supply <text:span text:style-name="T15">por sus siglas en ingles</text:span>).</text:p>
      <text:p text:style-name="P35"/>
      <text:list text:continue-numbering="true" text:style-name="L5">
        <text:list-item>
          <text:p text:style-name="P36">¿Cómo los sistemas de respaldo pueden ayudar en la continuidad del servicio? </text:p>
        </text:list-item>
      </text:list>
      <text:p text:style-name="P37">Estos dispositivos nos ayudarían a que nuestros dispositivos de trabajo y de suministro de internet no se corten y así no perdamos información mientras trabajamos, pero estos dispositivos tienen energía limitada dependiendo de la capacidad de batería del UPS.</text:p>
      <text:h text:style-name="P32" text:outline-level="3"><text:bookmark text:name="suministro-de-teléfono-e-internet"/><text:span text:style-name="Strong_20_Emphasis"><text:span text:style-name="T14">Suministro de teléfono e internet:</text:span></text:span></text:h>
      <text:list text:style-name="L6">
        <text:list-item>
          <text:p text:style-name="P38">Identifica los dispositivos clave para la conectividad. </text:p>
        </text:list-item>
      </text:list>
      <text:p text:style-name="P39">R: Los dispositivos que hacen que tengamos conectividad seria el router y la tarjeta de red de nuestro ordenador.</text:p>
      <text:list text:continue-numbering="true" text:style-name="L6">
        <text:list-item>
          <text:p text:style-name="P40">¿Cómo se gestiona la señal y el acceso a internet en un hogar? </text:p>
        </text:list-item>
      </text:list>
      <text:p text:style-name="P41">R: Con el Wifi de nuestra tarjeta de red del ordenador podremos conectarnos a nuestro router que es el suministro y acceso a internet en nuestro hogar.</text:p>
      <text:h text:style-name="P32" text:outline-level="3"><text:bookmark text:name="suministro-de-gas-natural-y-agua"/><text:span text:style-name="Strong_20_Emphasis"><text:span text:style-name="T14">Suministro de gas natural y agua:</text:span></text:span></text:h>
      <text:list text:style-name="L7">
        <text:list-item>
          <text:p text:style-name="P42">¿Qué sistemas informáticos podrían estar involucrados en su regulación?</text:p>
          <text:p text:style-name="P43"><text:s/></text:p>
        </text:list-item>
        <text:list-item>
          <text:p text:style-name="P44"><text:span text:style-name="Strong_20_Emphasis"><text:span text:style-name="T16">Sistemas SCADA</text:span></text:span><text:span text:style-name="T16"> (Supervisory Control and Data Acquisition)</text:span></text:p>
        </text:list-item>
        <text:list-item>
          <text:p text:style-name="P44"><text:span text:style-name="Strong_20_Emphasis"><text:span text:style-name="T16">PLC</text:span></text:span><text:span text:style-name="T16"> (Controladores Lógicos Programables)</text:span></text:p>
        </text:list-item>
      </text:list>
      <text:p text:style-name="P45"/>
      <text:p text:style-name="P45"/>
      <text:p text:style-name="P45"/>
      <text:list text:continue-numbering="true" text:style-name="L7">
        <text:list-item>
          <text:p text:style-name="P46"><text:soft-page-break/>¿Cómo la tecnología permite la monitorización y control del consumo? </text:p>
        </text:list-item>
      </text:list>
      <text:p text:style-name="P41"><text:span text:style-name="T17">R: </text:span>Los sensores de estos sistemas permiten monitorizar y controlar el consumo con sensores que miden la presion y el caudal <text:span text:style-name="T17">e instrumentos que controlan bombas y valvulas.</text:span></text:p>
      <text:p text:style-name="P47">Tambien existen servidores que almacenan informacion historica al igual que existen sistemas de gestion que generan facturas y ordenes de mantenimiento.</text:p>
      <text:p text:style-name="P47">Por eso, tanto el agua como el gas dependen hoy de una combinación de informática, telecomunicaciones, automatización industrial y ciberseguridad.</text:p>
      <text:h text:style-name="P48" text:outline-level="2"><text:bookmark text:name="04---importancia-de-las-copias-de-seguridad"/><text:span text:style-name="Strong_20_Emphasis"><text:span text:style-name="T14">04 - Importancia de las copias de seguridad</text:span></text:span></text:h>
      <text:p text:style-name="P31">¿Cuál es la importancia de realizar copias de seguridad periódicas de la información almacenada en los equipos informáticos?</text:p>
      <text:p text:style-name="P49"/>
      <text:p text:style-name="P31">¿Qué es crontab y cómo nos puede ayudar a programar copias de seguridad automáticas?</text:p>
      <text:p text:style-name="P47">R: La importancia de realizar copias de seguridad de la información almacenada es equipos informáticas hoy en día tiene un nivel muy importante, ya que nos permite acceder a la información de cualquier punto en el tiempo siempre y cuando se haya hecho una copia de seguridad.</text:p>
      <text:p text:style-name="P49"><text:span text:style-name="Strong_20_Emphasis"><text:span text:style-name="T12">Las copias de seguridad deberían de ser programadas <text:s/>y tener un sistema automático o manual para que se realicen.</text:span></text:span></text:p>
      <text:p text:style-name="P49"><text:span text:style-name="Strong_20_Emphasis"><text:span text:style-name="T12">Crontab es una herramienta que se utiliza en el sistema operativo Linux, entre otros, que nos permite especificar momentos en el tiempo en los que se tienen que ejecutar procesos.</text:span></text:span></text:p>
      <text:p text:style-name="P47">Para poder establecer las tareas y los momentos de ejecución se usa una programación definida mediante texto.</text:p>
      <text:p text:style-name="P47">Se utiliza una sintaxis particular pero no dificil de entender. <text:span text:style-name="T18">Este programa se utiliza con un daemon “cron” que se ejecuta en segundo plano en el sistema operativo y lo que hace es supervisar si existen tareas que deben ejecutarse en un momento dado.</text:span></text:p>
      <text:p text:style-name="P49"><text:span text:style-name="Strong_20_Emphasis"><text:span text:style-name="T19"/></text:span></text:p>
      <text:p text:style-name="P28"/>
      <text:p text:style-name="P28"/>
      <text:p text:style-name="P28"/>
      <text:p text:style-name="P28"/>
      <text:p text:style-name="P27"/>
      <text:p text:style-name="P25"/>
      <text:p text:style-name="P18"><text:soft-page-break/></text:p>
      <text:p text:style-name="Text_20_body"/>
      <text:p text:style-name="P50"/>
      <text:list text:continue-list="list62945725367734" text:style-name="L1">
        <text:list-header>
          <text:p text:style-name="P51"><text:span text:style-name="Strong_20_Emphasis"><text:span text:style-name="T20"/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09:58:00.897420073</meta:creation-date>
    <dc:date>2026-06-01T06:29:44.564992573</dc:date>
    <meta:editing-duration>PT3H27M13S</meta:editing-duration>
    <meta:editing-cycles>3</meta:editing-cycles>
    <meta:generator>LibreOffice/26.2.3.2$Linux_X86_64 LibreOffice_project/620$Build-2</meta:generator>
    <meta:document-statistic meta:table-count="0" meta:image-count="1" meta:object-count="0" meta:page-count="6" meta:paragraph-count="82" meta:word-count="1030" meta:character-count="6161" meta:non-whitespace-character-count="5222"/>
  </office:meta>
</office:document-meta>
</file>